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2pt" fo:font-weight="bold" officeooo:paragraph-rsid="000cdf6a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end" style:justify-single-word="false"/>
      <style:text-properties officeooo:paragraph-rsid="000cdf6a"/>
    </style:style>
    <style:style style:name="P3" style:family="paragraph" style:parent-style-name="Standard">
      <style:text-properties officeooo:paragraph-rsid="000cdf6a"/>
    </style:style>
    <style:style style:name="P4" style:family="paragraph" style:parent-style-name="Standard">
      <style:paragraph-properties fo:text-align="end" style:justify-single-word="false"/>
      <style:text-properties fo:font-size="12pt" fo:font-weight="normal" officeooo:paragraph-rsid="000cdf6a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db5ce" officeooo:paragraph-rsid="000db5ce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db5ce" officeooo:paragraph-rsid="000db5ce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e0531" officeooo:paragraph-rsid="000e0531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paragraph-rsid="000cdf6a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0cdf6a" officeooo:paragraph-rsid="000cdf6a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fo:font-weight="bold" officeooo:rsid="000db5ce" officeooo:paragraph-rsid="000db5ce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weight="bold" officeooo:rsid="000db5ce" officeooo:paragraph-rsid="000db5ce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font-weight="bold" officeooo:rsid="000e0531" officeooo:paragraph-rsid="000e0531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fo:font-weight="bold" officeooo:rsid="000db5ce" officeooo:paragraph-rsid="000db5ce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fo:font-style="normal" fo:font-weight="bold" officeooo:rsid="000db5ce" officeooo:paragraph-rsid="000db5ce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24pt" fo:font-weight="bold" officeooo:paragraph-rsid="000cdf6a" style:font-size-asian="24pt" style:font-weight-asian="bold" style:font-size-complex="2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20pt" fo:font-weight="bold" officeooo:paragraph-rsid="000cdf6a" style:font-size-asian="20pt" style:font-weight-asian="bold" style:font-size-complex="20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20pt" fo:font-weight="bold" officeooo:rsid="000cdf6a" officeooo:paragraph-rsid="000cdf6a" style:font-size-asian="20pt" style:font-weight-asian="bold" style:font-size-complex="20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20pt" fo:font-weight="bold" officeooo:rsid="000db5ce" officeooo:paragraph-rsid="000db5ce" style:font-size-asian="20pt" style:font-weight-asian="bold" style:font-size-complex="20pt" style:font-weight-complex="bold"/>
    </style:style>
    <style:style style:name="P22" style:family="paragraph" style:parent-style-name="Standard" style:list-style-name="L1">
      <style:text-properties officeooo:paragraph-rsid="000cdf6a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>
      <style:paragraph-properties fo:text-align="justify" style:justify-single-word="false"/>
      <style:text-properties officeooo:paragraph-rsid="000cdf6a"/>
    </style:style>
    <style:style style:name="P25" style:family="paragraph" style:parent-style-name="Standard">
      <style:text-properties officeooo:rsid="000cdf6a" officeooo:paragraph-rsid="000cdf6a"/>
    </style:style>
    <style:style style:name="P26" style:family="paragraph" style:parent-style-name="Standard">
      <style:text-properties officeooo:rsid="000db5ce" officeooo:paragraph-rsid="000db5ce"/>
    </style:style>
    <style:style style:name="T1" style:family="text">
      <style:text-properties officeooo:rsid="000cdf6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>Capstone Project </text:p>
      <text:p text:style-name="P3">Machine Learning Engineer Nanodegree </text:p>
      <text:p text:style-name="P4"><text:span text:style-name="T1">Keyvan</text:span> <text:span text:style-name="T1">Tajbakhsh</text:span></text:p>
      <text:p text:style-name="P2"><text:span text:style-name="T1">July</text:span> <text:span text:style-name="T1">10</text:span>th, 201<text:span text:style-name="T1">9</text:span></text:p>
      <text:p text:style-name="Standard"/>
      <text:p text:style-name="Standard"/>
      <text:p text:style-name="Standard"/>
      <text:p text:style-name="P18">Definition</text:p>
      <text:p text:style-name="P8"/>
      <text:p text:style-name="P9">Project Overview</text:p>
      <text:p text:style-name="P9"/>
      <text:p text:style-name="P23">Vision loss is a problem that affects people all around the world. As computers are getting better at</text:p>
      <text:p text:style-name="P23">understanding images due to advances in computer vision, the concept of a virtual assistant for the</text:p>
      <text:p text:style-name="P23">blind that could read text 1 , identify/spot objects 2 , or even describe a whole scene in natural language 3 is becoming increasingly realistic.</text:p>
      <text:p text:style-name="P23"/>
      <text:p text:style-name="P23">In this project, I created an Android application capable of reading aloud everyday text (e.g. product</text:p>
      <text:p text:style-name="P23">labels, price tags, text on clothing). The application uses a classifier trained using the MS-COCO 4 and</text:p>
      <text:p text:style-name="P23">COCO-Text 5 datasets to look for text and uses Google Cloud Vision to extract the text.</text:p>
      <text:p text:style-name="P23">The project was inspired by <text:span text:style-name="T1">this</text:span> Reddit thread </text:p>
      <text:p text:style-name="P24"/>
      <text:p text:style-name="P10">Problem Statement</text:p>
      <text:p text:style-name="P10"/>
      <text:p text:style-name="P3">The goal is to create a general text-reader running on Android smartphones; the tasks involved are the</text:p>
      <text:p text:style-name="P3">following:</text:p>
      <text:p text:style-name="P3"/>
      <text:list xml:id="list2377016116" text:style-name="L1">
        <text:list-item>
          <text:p text:style-name="P22">Download and preprocess the MS-COCO and COCO-Text data</text:p>
        </text:list-item>
        <text:list-item>
          <text:p text:style-name="P22">Train a classifier that can determine if an image contains text</text:p>
        </text:list-item>
        <text:list-item>
          <text:p text:style-name="P22">Make the classifier run on Android</text:p>
        </text:list-item>
        <text:list-item>
          <text:p text:style-name="P22">Make the app extract the text (if any) using Google Cloud Vision</text:p>
        </text:list-item>
        <text:list-item>
          <text:p text:style-name="P22">Make the app speak the extracted text aloud</text:p>
        </text:list-item>
        <text:list-item>
          <text:p text:style-name="P22"/>
        </text:list-item>
      </text:list>
      <text:p text:style-name="P3">The final application is expected to be useful for reading product labels, price tags, and other kinds of</text:p>
      <text:p text:style-name="P3">short, printed text.</text:p>
      <text:p text:style-name="P3"/>
      <text:p text:style-name="P10">Metrics</text:p>
      <text:p text:style-name="P10"/>
      <text:p text:style-name="P3">Accuracy is a common metric for binary classifiers; it takes into account both true positives and true</text:p>
      <text:p text:style-name="P3">negatives with equal weight.</text:p>
      <text:p text:style-name="P3">a ccuracy =</text:p>
      <text:p text:style-name="P3">true positives + true negatives</text:p>
      <text:p text:style-name="P3">dataset size</text:p>
      <text:p text:style-name="P3"/>
      <text:p text:style-name="P19"><text:soft-page-break/>Analysis</text:p>
      <text:p text:style-name="P19"/>
      <text:p text:style-name="P10">Data Exploration</text:p>
      <text:p text:style-name="P10"/>
      <text:p text:style-name="P3">The COCO (Common Objects in Context) dataset has hundreds of thousands of richly annotated</text:p>
      <text:p text:style-name="P3">images; the annotations are not described here because only the images are used. More accurately, only</text:p>
      <text:p text:style-name="P3">a subset of the images are used, the 2014 training images, as the COCO-Text 1.0 dataset has</text:p>
      <text:p text:style-name="P3">annotations only for that particular subset. Of the 82,783 images, 63,686 contain text; altogether there</text:p>
      <text:p text:style-name="P3">are 173,589 text instances, which is more than enough to train the classifier. The images are colored</text:p>
      <text:p text:style-name="P3">and have around 600 * 400 pixels each.</text:p>
      <text:p text:style-name="P3"/>
      <text:p text:style-name="P3"/>
      <text:p text:style-name="P25">Fig.1</text:p>
      <text:p text:style-name="P25"/>
      <text:p text:style-name="P11">Exploratory Visualization</text:p>
      <text:p text:style-name="P11"/>
      <text:p text:style-name="P25">The plot below shows how the legible, English text annotations are distributed among the images. This</text:p>
      <text:p text:style-name="P25">is helpful for predicting how balanced the classes will be after the images are segmented (see the Data Preprocessing section).</text:p>
      <text:p text:style-name="P25"/>
      <text:p text:style-name="P25">Fig. 2 A plot showing how the legible, English text annotations are distributed among the images.</text:p>
      <text:p text:style-name="P25">Note that the distribution is right-tailed. (The 9+ column is large only because it contains the sum of all</text:p>
      <text:p text:style-name="P25">of the other columns which were cut off from the plot.) If the distribution was left-tailed, that would</text:p>
      <text:p text:style-name="P25">suggest that the annotations are mostly assigned to a few of the images, which could result in</text:p>
      <text:p text:style-name="P25">overfitting.</text:p>
      <text:p text:style-name="P25"/>
      <text:p text:style-name="P25">Fig. 3 The following plot shows how the areas of the bounding boxes of the same annotations are</text:p>
      <text:p text:style-name="P25">distributed. This information can be helpful when trying to decide how big the image segments should be; if the area of an annotation is larger than the area of a segment, then the annotation will be surely split apart, which should be avoided for most of the annotations.</text:p>
      <text:p text:style-name="P25"/>
      <text:p text:style-name="P11">Algorithms and Techniques</text:p>
      <text:p text:style-name="P11"/>
      <text:p text:style-name="P25">The classifier is a Convolutional Neural Network , which is the state-of-the-art algorithm for most</text:p>
      <text:p text:style-name="P25">image processing tasks, including classification. It needs a large amount of training data compared to</text:p>
      <text:p text:style-name="P25">other approaches; fortunately, the COCO and COCO-Text datasets are big enough. The algorithm</text:p>
      <text:p text:style-name="P25">outputs an assigned probability for each class; this can be used to reduce the number of false positives using a threshold. (The tradeoff is that this increases the number of false negatives.)</text:p>
      <text:p text:style-name="P25">The following parameters can be tuned to optimize the classifier:</text:p>
      <text:p text:style-name="P25"/>
      <text:p text:style-name="P11">Benchmark</text:p>
      <text:p text:style-name="P11"/>
      <text:p text:style-name="P25">To create an initial benchmark for the classifier, I used DIGITS (a web interface to the Caffe deep</text:p>
      <text:p text:style-name="P25">learning library, to try multiple architectures. The “standard” LeNet architecture ( Fig. 5 ) achieved the</text:p>
      <text:p text:style-name="P25">best accuracy, around 0.8.</text:p>
      <text:p text:style-name="P20"><text:soft-page-break/>Methodology</text:p>
      <text:p text:style-name="P25"/>
      <text:p text:style-name="P11">Data Preprocessing</text:p>
      <text:p text:style-name="P25"/>
      <text:p text:style-name="P25">The preprocessing done in the “Prepare data” notebook consists of the following steps:</text:p>
      <text:p text:style-name="P25">1. The list of images is randomized</text:p>
      <text:p text:style-name="P25">2. The images are divided into a training set and a validation set</text:p>
      <text:p text:style-name="P25">3. The images are split into square shaped segments; random noise is used for padding</text:p>
      <text:p text:style-name="P25">4. Each of the segments gets a label, which is “text” if the overlap between the segment and one</text:p>
      <text:p text:style-name="P25">of the annotations 6 is greater than a ​</text:p>
      <text:p text:style-name="P25">threshold ​</text:p>
      <text:p text:style-name="P25">, and “no-text” otherwise</text:p>
      <text:p text:style-name="P25">There are also some preprocessing steps which are done as the images get loaded into memory before</text:p>
      <text:p text:style-name="P25">training:</text:p>
      <text:p text:style-name="P25"/>
      <text:p text:style-name="P26">fig.4</text:p>
      <text:p text:style-name="P26"/>
      <text:p text:style-name="P12">Implementation</text:p>
      <text:p text:style-name="P12"/>
      <text:p text:style-name="P5">The implementation process can be split into two main stages:</text:p>
      <text:p text:style-name="P5">1. The classifier training stage</text:p>
      <text:p text:style-name="P5">2. The application development stage</text:p>
      <text:p text:style-name="P5">During the first stage, the classifier was trained on the preprocessed training data. This was done in a</text:p>
      <text:p text:style-name="P5">Jupyter notebook (titled “Create and freeze graph”), and can be further divided into the following</text:p>
      <text:p text:style-name="P5">steps:</text:p>
      <text:p text:style-name="P5"/>
      <text:p text:style-name="P5">fig.5</text:p>
      <text:p text:style-name="P5"/>
      <text:p text:style-name="P12">Refinement</text:p>
      <text:p text:style-name="P5"/>
      <text:p text:style-name="P5">As mentioned in the Benchmark section, the LeNet architecture trained with Caffe achieved a good</text:p>
      <text:p text:style-name="P5">accuracy, around 80%. (This is considered good because around 20% of the positive training examples</text:p>
      <text:p text:style-name="P5">contain only a single character, or just some portion of a character, and as such are essentially false</text:p>
      <text:p text:style-name="P5">positives.)</text:p>
      <text:p text:style-name="P5">To get the initial result, this architecture was ported to TensorFlow; the result was an accuracy around</text:p>
      <text:p text:style-name="P5">70%. This was improved upon by using the following techniques:</text:p>
      <text:p text:style-name="P5"/>
      <text:p text:style-name="P7">fig.6</text:p>
      <text:p text:style-name="P5"/>
      <text:p text:style-name="P21"/>
      <text:p text:style-name="P21"/>
      <text:p text:style-name="P21"/>
      <text:p text:style-name="P21"/>
      <text:p text:style-name="P21"><text:soft-page-break/>Results</text:p>
      <text:p text:style-name="P21"/>
      <text:p text:style-name="P15">Model Evaluation and Validation</text:p>
      <text:p text:style-name="P15"/>
      <text:p text:style-name="P6">During development, a validation set was used to evaluate the model.The final architecture and hyperparameters were chosen because they performed the best among the</text:p>
      <text:p text:style-name="P6">tried combinations.</text:p>
      <text:p text:style-name="P6">For a complete description of the final model and the training process, refer to ​</text:p>
      <text:p text:style-name="P6">Figure 5 along with the</text:p>
      <text:p text:style-name="P6">following list:</text:p>
      <text:p text:style-name="P6"/>
      <text:p text:style-name="P13">Justification</text:p>
      <text:p text:style-name="P14"/>
      <text:p text:style-name="P6">Using a Galaxy Note 4 on a 4G network/Wi-Fi, I got the following results:</text:p>
      <text:p text:style-name="P6">❖ The classification delay is about 3 seconds, which is about the same as that of the benchmark</text:p>
      <text:p text:style-name="P6">❖ The processing delay is around 5 seconds, which is better than that of the benchmark</text:p>
      <text:p text:style-name="P6">❖ The per-image classification accuracy 7 is higher than 90% 8</text:p>
      <text:p text:style-name="P6">To understand how successful the final application is, it’s also important to know the overall text</text:p>
      <text:p text:style-name="P6">extraction performance, which is illustrated by ​</text:p>
      <text:p text:style-name="P6">Figure 7 ​</text:p>
      <text:p text:style-name="P6">.</text:p>
      <text:p text:style-name="P6">It can be seen that the application is useful for reading labels, but also that it can get confused by hard</text:p>
      <text:p text:style-name="P6">to read text (such as that on the cardboard box), and it can miss text that is too low-contrast compared</text:p>
      <text:p text:style-name="P6">to its background.</text:p>
      <text:p text:style-name="P6"/>
      <text:p text:style-name="P21">Conclusion</text:p>
      <text:p text:style-name="P21"/>
      <text:p text:style-name="P13">Free-Form Visualization</text:p>
      <text:p text:style-name="P13"/>
      <text:p text:style-name="P6">Fig. 7 Examples of text detected/ignored by the application. Each of the objects was tested with 3</text:p>
      <text:p text:style-name="P6">times; the green boxes mark text that was read successfully at least 2 times. Orange means at least some</text:p>
      <text:p text:style-name="P6">words were successfully read at least one time. Red means the text was consistently ignored</text:p>
      <text:p text:style-name="P6"/>
      <text:p text:style-name="P16">Reflection</text:p>
      <text:p text:style-name="P16"/>
      <text:p text:style-name="P6">The process used for this project can be summarized using the following steps:</text:p>
      <text:p text:style-name="P6">1. An initial problem and relevant, public datasets were found</text:p>
      <text:p text:style-name="P6">2. The data was downloaded and preprocessed (segmented)</text:p>
      <text:p text:style-name="P6">3. A benchmark was created for the classifier</text:p>
      <text:p text:style-name="P6">4. The classifier was trained using the data (multiple times, until a good set of parameters were</text:p>
      <text:p text:style-name="P6">found)</text:p>
      <text:p text:style-name="P6">5. The TensorFlow Android demo was adapted to run the classifier</text:p>
      <text:p text:style-name="P6"><text:soft-page-break/>6. The application was extended so that it can extract text from images using the Google Cloud</text:p>
      <text:p text:style-name="P6">Vision API</text:p>
      <text:p text:style-name="P6">7. Feeding the extracted text to the TTS system was implemented</text:p>
      <text:p text:style-name="P6">I found steps 4 and 5 the most difficult, as I had to familiarize myself with the files of the TensorFlow</text:p>
      <text:p text:style-name="P6">Android demo, which uses Bazel and the Android NDK, both of which were technologies that I was</text:p>
      <text:p text:style-name="P6">not familiar with before the project.</text:p>
      <text:p text:style-name="P6">As for the most interesting aspects of the project, I’m very glad that I found the COCO and</text:p>
      <text:p text:style-name="P6">COCO-Text datasets, as I’m sure they’ll be useful for later projects/experiments. I’m also happy about</text:p>
      <text:p text:style-name="P6">getting to use TensorFlow, as I believe it will be the deep learning library in the future.</text:p>
      <text:p text:style-name="P6"/>
      <text:p text:style-name="P13">Improvement</text:p>
      <text:p text:style-name="P13"/>
      <text:p text:style-name="P6">To achieve the optimal user experience, using more capable hardware 9 and moving the text extraction</text:p>
      <text:p text:style-name="P6">process from the cloud to the device would be essential. This would reduce the processing time and</text:p>
      <text:p text:style-name="P6">give access to the outputs of all of the modules of the text extraction pipeline, which would, in turn,</text:p>
      <text:p text:style-name="P6">enable the following features:</text:p>
      <text:p text:style-name="P6">❖ User-guided reading (e.g. read big text first, or read the text the user is pointing at)</text:p>
      <text:p text:style-name="P6">❖ Better support for languages other than English</text:p>
      <text:p text:style-name="P6">❖ Output filtering (e.g. ignore text smaller than some adjustable threshold)</text:p>
      <text:p text:style-name="P6">❖ Passive text detection (auditory cue on text detection, perhaps with additional information</text:p>
      <text:p text:style-name="P6">encoded in the tone and volume)</text:p>
      <text:p text:style-name="P6">The user experience could also be improved significantly by using MXNet, which is a deep learning</text:p>
      <text:p text:style-name="P6">library that is better optimized for mobile devices than TensorFlow. The speedup wouldn’t be enough</text:p>
      <text:p text:style-name="P6">for running text extraction on the device, but it would reduce the classification delay significant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01:48:14.667205829</meta:creation-date>
    <dc:date>2019-07-01T02:49:40.447523444</dc:date>
    <meta:editing-duration>PT19M12S</meta:editing-duration>
    <meta:editing-cycles>1</meta:editing-cycles>
    <meta:document-statistic meta:table-count="0" meta:image-count="0" meta:object-count="0" meta:page-count="5" meta:paragraph-count="142" meta:word-count="1469" meta:character-count="8812" meta:non-whitespace-character-count="7477"/>
    <meta:generator>LibreOffice/6.0.7.3$Linux_X86_64 LibreOffice_project/00m0$Build-3</meta:generator>
  </office:meta>
</office:document-meta>
</file>